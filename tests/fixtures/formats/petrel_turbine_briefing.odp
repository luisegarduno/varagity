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etrel-6 Tidal Turbine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etrel-6 Tidal Turbine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Quarterly engineering briefing, Bruma sound arra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rformance figur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erformance figure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The Petrel-6 tidal turbine produces 3.4 megawatts at peak flow.</text:span></text:p>
              </text:list-item>
              <text:list-item>
                <text:p text:style-name="P6"><text:span text:style-name="T3">Availability last quarter held at 96 perc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intenance outlook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intenance outlook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Blade inspection scheduled for the neap-tide window in Marc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24.2.7.2$Linux_X86_64 LibreOffice_project/420$Build-2</meta:generator>
    <meta:document-statistic meta:object-count="146"/>
    <meta:user-defined meta:name="AppVersion">14.0000</meta:user-defined>
    <meta:user-defined meta:name="PresentationFormat">On-screen Show (4:3)</meta:user-defined>
  </office:meta>
</office:document-meta>
</file>