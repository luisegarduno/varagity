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llwing Ferry Operations Manual</text:h>
      <text:p text:style-name="Standard">The Gullwing is a 34-meter hybrid passenger ferry serving the Wrenhaven-to-Saltmere crossing. This manual covers routine drivetrain operations for licensed crew.</text:p>
      <text:h text:style-name="Heading_20_2" text:outline-level="2">Drivetrain modes</text:h>
      <text:p text:style-name="Standard">During open-water transit the Gullwing runs on its twin diesel generators. The hybrid drivetrain switches to battery-electric power 800 meters before docking, cutting harbor noise and wake.</text:p>
      <text:p text:style-name="Standard">Battery reserve must read at least 30 percent before departure; below that threshold the ferry may not leave the qua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74" meta:character-count="516" meta:non-whitespace-character-count="447"/>
    <meta:user-defined meta:name="AppVersion">14.0000</meta:user-defined>
    <meta:template xlink:type="simple" xlink:actuate="onRequest" xlink:title="Normal.dotm" xlink:href=""/>
  </office:meta>
</office:document-meta>
</file>